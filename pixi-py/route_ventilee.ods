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Fém_de_JàS-A">
        <table:table-row>
          <table:table-cell>
            <text:p>Noms - Prénoms *</text:p>
          </table:table-cell>
          <table:table-cell>
            <text:p>Date de délivrance *</text:p>
          </table:table-cell>
          <table:table-cell>
            <text:p>N° licence FSGT 2026 *</text:p>
          </table:table-cell>
          <table:table-cell>
            <text:p>Date de naissance *</text:p>
          </table:table-cell>
          <table:table-cell>
            <text:p>multi licencié oui / non *</text:p>
          </table:table-cell>
          <table:table-cell>
            <text:p>catégorie</text:p>
          </table:table-cell>
          <table:table-cell>
            <text:p>titre route 2026*</text:p>
          </table:table-cell>
          <table:table-cell>
            <text:p>Participations</text:p>
          </table:table-cell>
        </table:table-row>
        <table:table-row>
          <table:table-cell>
            <text:p>DUCOTE Juline</text:p>
          </table:table-cell>
          <table:table-cell>
            <text:p>11/12/2025</text:p>
          </table:table-cell>
          <table:table-cell>
            <text:p>172335</text:p>
          </table:table-cell>
          <table:table-cell>
            <text:p>06/11/2008</text:p>
          </table:table-cell>
          <table:table-cell>
            <text:p>Oui</text:p>
          </table:table-cell>
          <table:table-cell>
            <text:p>Junior F</text:p>
          </table:table-cell>
          <table:table-cell>
            <text:p>CHAMPIONNE REGIONALE</text:p>
          </table:table-cell>
          <table:table-cell>
            <text:p>24/05/2026 SENNECEY LE GRAND Championnat Départemental Route FSGT 71 - 14/05/2026 LE BREUIL CREUSOT VS Route - 10/05/2026 FORLEANS Championnat Régional Route FSGT BFC - 08/05/2026 GENELARD ASPTT CHALON Route - 01/05/2026 VERDUN SUR LE DOUBS Route - 11/04/2026 CHATENOY EN BRESSE ST MARCEL Route - 05/04/2026 ST MARTIN EN BRESSE Route - 28/03/2026 VARENNES ST SAUVEUR Route.</text:p>
          </table:table-cell>
        </table:table-row>
        <table:table-row>
          <table:table-cell>
            <text:p>DUCOTE Laurine</text:p>
          </table:table-cell>
          <table:table-cell>
            <text:p>11/12/2025</text:p>
          </table:table-cell>
          <table:table-cell>
            <text:p>172334</text:p>
          </table:table-cell>
          <table:table-cell>
            <text:p>04/12/2012</text:p>
          </table:table-cell>
          <table:table-cell>
            <text:p>Oui</text:p>
          </table:table-cell>
          <table:table-cell>
            <text:p>Minime F</text:p>
          </table:table-cell>
          <table:table-cell>
            <text:p>CHAMPIONNE REGIONALE</text:p>
          </table:table-cell>
          <table:table-cell>
            <text:p>24/05/2026 SENNECEY LE GRAND Championnat Départemental Route FSGT 71 - 14/05/2026 LE BREUIL CREUSOT VS Route - 10/05/2026 FORLEANS Championnat Régional Route FSGT BFC - 08/05/2026 GENELARD ASPTT CHALON Route - 03/05/2026 GRANGES Route.</text:p>
          </table:table-cell>
        </table:table-row>
        <table:table-row>
          <table:table-cell>
            <text:p>DZIDUCH Hélène</text:p>
          </table:table-cell>
          <table:table-cell>
            <text:p>12/12/2025</text:p>
          </table:table-cell>
          <table:table-cell>
            <text:p>409231</text:p>
          </table:table-cell>
          <table:table-cell>
            <text:p>21/11/1967</text:p>
          </table:table-cell>
          <table:table-cell>
            <text:p>Non</text:p>
          </table:table-cell>
          <table:table-cell>
            <text:p>Super-Vétéran F</text:p>
          </table:table-cell>
          <table:table-cell>
            <text:p>CHAMPIONNE REGIONALE</text:p>
          </table:table-cell>
          <table:table-cell>
            <text:p>24/05/2026 SENNECEY LE GRAND Championnat Départemental Route FSGT 71 - 16/05/2026 BAUDRIERES ST MARCEL Route - 14/05/2026 LE BREUIL CREUSOT VS Route - 10/05/2026 FORLEANS Championnat Régional Route FSGT BFC - 08/05/2026 GENELARD ASPTT CHALON Route - 19/04/2026 ST EUSEBE ECUISSES Route - 05/04/2026 ST MARTIN EN BRESSE Route - 08/03/2026 Vivans MARCIGNY Route.</text:p>
          </table:table-cell>
        </table:table-row>
        <table:table-row>
          <table:table-cell>
            <text:p>GRAPIN Laëtitia</text:p>
          </table:table-cell>
          <table:table-cell>
            <text:p>15/12/2025</text:p>
          </table:table-cell>
          <table:table-cell>
            <text:p>171634</text:p>
          </table:table-cell>
          <table:table-cell>
            <text:p>22/12/1979</text:p>
          </table:table-cell>
          <table:table-cell>
            <text:p>Non</text:p>
          </table:table-cell>
          <table:table-cell>
            <text:p>Vétéran F</text:p>
          </table:table-cell>
          <table:table-cell>
            <text:p/>
          </table:table-cell>
          <table:table-cell>
            <text:p>24/05/2026 SENNECEY LE GRAND Championnat Départemental Route FSGT 71 - 14/05/2026 LE BREUIL CREUSOT VS Route - 03/05/2026 GRANGES Route - 01/05/2026 VERDUN SUR LE DOUBS Route - 26/04/2026 LES BIZOTS CREUSOT VS - 19/04/2026 ST EUSEBE ECUISSES Route - 11/04/2026 CHATENOY EN BRESSE ST MARCEL Route - 05/04/2026 ST MARTIN EN BRESSE Route.</text:p>
          </table:table-cell>
        </table:table-row>
        <table:table-row>
          <table:table-cell>
            <text:p>LAROCHE Hélona</text:p>
          </table:table-cell>
          <table:table-cell>
            <text:p>28/12/2025</text:p>
          </table:table-cell>
          <table:table-cell>
            <text:p>581903</text:p>
          </table:table-cell>
          <table:table-cell>
            <text:p>21/11/2013</text:p>
          </table:table-cell>
          <table:table-cell>
            <text:p>Non</text:p>
          </table:table-cell>
          <table:table-cell>
            <text:p>Minime F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10/05/2026 FORLEANS Championnat Régional Route FSGT BFC - 08/05/2026 GENELARD ASPTT CHALON Route.</text:p>
          </table:table-cell>
        </table:table-row>
        <table:table-row>
          <table:table-cell>
            <text:p>MORNAT Mathilde</text:p>
          </table:table-cell>
          <table:table-cell>
            <text:p>18/01/2026</text:p>
          </table:table-cell>
          <table:table-cell>
            <text:p>171520</text:p>
          </table:table-cell>
          <table:table-cell>
            <text:p>21/06/2012</text:p>
          </table:table-cell>
          <table:table-cell>
            <text:p>Non</text:p>
          </table:table-cell>
          <table:table-cell>
            <text:p>Minime F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10/05/2026 FORLEANS Championnat Régional Route FSGT BFC - 03/05/2026 GRANGES Route.</text:p>
          </table:table-cell>
        </table:table-row>
        <table:table-row>
          <table:table-cell>
            <text:p>PICARD Odette</text:p>
          </table:table-cell>
          <table:table-cell>
            <text:p>17/12/2025</text:p>
          </table:table-cell>
          <table:table-cell>
            <text:p>172007</text:p>
          </table:table-cell>
          <table:table-cell>
            <text:p>09/06/1957</text:p>
          </table:table-cell>
          <table:table-cell>
            <text:p>Non</text:p>
          </table:table-cell>
          <table:table-cell>
            <text:p>Ancien F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03/05/2026 GRANGES Route - 11/04/2026 CHATENOY EN BRESSE ST MARCEL Route - 05/04/2026 ST MARTIN EN BRESSE Route - 28/03/2026 VARENNES ST SAUVEUR Route - 07/03/2026 VERZE FLACE Route.</text:p>
          </table:table-cell>
        </table:table-row>
        <table:table-row>
          <table:table-cell>
            <text:p>PILLON BRAILLON Stephanie</text:p>
          </table:table-cell>
          <table:table-cell>
            <text:p>31/12/2025</text:p>
          </table:table-cell>
          <table:table-cell>
            <text:p>171438</text:p>
          </table:table-cell>
          <table:table-cell>
            <text:p>13/04/1974</text:p>
          </table:table-cell>
          <table:table-cell>
            <text:p>Non</text:p>
          </table:table-cell>
          <table:table-cell>
            <text:p>Super-Vétéran F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0/05/2026 FORLEANS Championnat Régional Route FSGT BFC - 19/04/2026 ST EUSEBE ECUISSES Route - 11/04/2026 CHATENOY EN BRESSE ST MARCEL Route - 05/04/2026 ST MARTIN EN BRESSE Route - 28/03/2026 VARENNES ST SAUVEUR Route - 28/02/2026 ECUELLES VERDUN Route.</text:p>
          </table:table-cell>
        </table:table-row>
        <table:table-row>
          <table:table-cell>
            <text:p>PIRIO Suzanne</text:p>
          </table:table-cell>
          <table:table-cell>
            <text:p>25/01/2026</text:p>
          </table:table-cell>
          <table:table-cell>
            <text:p>171811</text:p>
          </table:table-cell>
          <table:table-cell>
            <text:p>12/03/1964</text:p>
          </table:table-cell>
          <table:table-cell>
            <text:p>Non</text:p>
          </table:table-cell>
          <table:table-cell>
            <text:p>Ancien F</text:p>
          </table:table-cell>
          <table:table-cell>
            <text:p>CHAMPIONNE REGIONALE</text:p>
          </table:table-cell>
          <table:table-cell>
            <text:p>24/05/2026 SENNECEY LE GRAND Championnat Départemental Route FSGT 71 - 10/05/2026 FORLEANS Championnat Régional Route FSGT BFC - 03/05/2026 GRANGES Route - 01/05/2026 VERDUN SUR LE DOUBS Route - 11/04/2026 CHATENOY EN BRESSE ST MARCEL Route - 05/04/2026 ST MARTIN EN BRESSE Route - 21/03/2026 ST MARTIN EN GATINOIS VS CHALON Route - 07/09/2025 ST MARTIN EN BRESSE Clm.</text:p>
          </table:table-cell>
        </table:table-row>
        <table:table-row>
          <table:table-cell>
            <text:p>PIRIO Suzanne</text:p>
          </table:table-cell>
          <table:table-cell>
            <text:p>23/01/2026</text:p>
          </table:table-cell>
          <table:table-cell>
            <text:p>171811</text:p>
          </table:table-cell>
          <table:table-cell>
            <text:p>12/03/1964</text:p>
          </table:table-cell>
          <table:table-cell>
            <text:p>Non</text:p>
          </table:table-cell>
          <table:table-cell>
            <text:p>Ancien F</text:p>
          </table:table-cell>
          <table:table-cell>
            <text:p/>
          </table:table-cell>
          <table:table-cell>
            <text:p>DOUBLONS</text:p>
          </table:table-cell>
        </table:table-row>
        <table:table-row>
          <table:table-cell>
            <text:p>ZACCHIA Jocelyne</text:p>
          </table:table-cell>
          <table:table-cell>
            <text:p>16/12/2025</text:p>
          </table:table-cell>
          <table:table-cell>
            <text:p>171416</text:p>
          </table:table-cell>
          <table:table-cell>
            <text:p>18/02/1972</text:p>
          </table:table-cell>
          <table:table-cell>
            <text:p>Non</text:p>
          </table:table-cell>
          <table:table-cell>
            <text:p>Super-Vétéran F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03/05/2026 GRANGES Route - 01/05/2026 VERDUN SUR LE DOUBS Route - 19/04/2026 ST EUSEBE ECUISSES Route - 05/04/2026 ST MARTIN EN BRESSE Route - 28/02/2026 ECUELLES VERDUN Route - 21/09/2025 CHAMPIONNAT DE LA BRUME CREUSOT VS CLM ANNULE mais sur la liste des engagés.</text:p>
          </table:table-cell>
        </table:table-row>
      </table:table>
      <table:table table:name="Min_G">
        <table:table-row>
          <table:table-cell>
            <text:p>Noms - Prénoms *</text:p>
          </table:table-cell>
          <table:table-cell>
            <text:p>Date de délivrance *</text:p>
          </table:table-cell>
          <table:table-cell>
            <text:p>N° licence FSGT 2026 *</text:p>
          </table:table-cell>
          <table:table-cell>
            <text:p>Date de naissance *</text:p>
          </table:table-cell>
          <table:table-cell>
            <text:p>multi licencié oui / non *</text:p>
          </table:table-cell>
          <table:table-cell>
            <text:p>catégorie</text:p>
          </table:table-cell>
          <table:table-cell>
            <text:p>titre route 2026*</text:p>
          </table:table-cell>
          <table:table-cell>
            <text:p>Participations</text:p>
          </table:table-cell>
        </table:table-row>
        <table:table-row>
          <table:table-cell>
            <text:p>BELLEVRAT Titien</text:p>
          </table:table-cell>
          <table:table-cell>
            <text:p>18/01/2026</text:p>
          </table:table-cell>
          <table:table-cell>
            <text:p>526485</text:p>
          </table:table-cell>
          <table:table-cell>
            <text:p>13/07/2012</text:p>
          </table:table-cell>
          <table:table-cell>
            <text:p>Non</text:p>
          </table:table-cell>
          <table:table-cell>
            <text:p>Minime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01/05/2026 VERDUN Route - 26/04/2026 LES BIZOTS CREUSOT VS Route - 19/04/2026 ST EUSEBE ECUISSES Route - 28/03/2026 VARENNES ST SAUVEUR Route - 28/02/2026 ECUELLES VERDUN Route.</text:p>
          </table:table-cell>
        </table:table-row>
        <table:table-row>
          <table:table-cell>
            <text:p>BOUCROT Léon</text:p>
          </table:table-cell>
          <table:table-cell>
            <text:p>20/12/2025</text:p>
          </table:table-cell>
          <table:table-cell>
            <text:p>476981</text:p>
          </table:table-cell>
          <table:table-cell>
            <text:p>26/04/2013</text:p>
          </table:table-cell>
          <table:table-cell>
            <text:p>Non</text:p>
          </table:table-cell>
          <table:table-cell>
            <text:p>Minime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0/05/2026 FORLEANS Championnat Régional Route FSGT BFC - 08/05/2026 GENELARD ASPTT CHALON Route - 03/05/2026 GRANGES Route - 01/05/2026 VERDUN SUR LE DOUBS Route - 19/04/2026 ST EUSEBE ECUISSES Route - 11/04/2026 CHATENOY EN BRESSE ST MARCEL Route.</text:p>
          </table:table-cell>
        </table:table-row>
        <table:table-row>
          <table:table-cell>
            <text:p>DEMONGEOT Andréas</text:p>
          </table:table-cell>
          <table:table-cell>
            <text:p>16/12/2025</text:p>
          </table:table-cell>
          <table:table-cell>
            <text:p>528807</text:p>
          </table:table-cell>
          <table:table-cell>
            <text:p>01/03/2013</text:p>
          </table:table-cell>
          <table:table-cell>
            <text:p>Non</text:p>
          </table:table-cell>
          <table:table-cell>
            <text:p>Minime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08/05/2026 GENELARD ASPTT CHALON Route - 01/05/2026 VERDUN SUR LE DOUBS Route - 26/04/2026 LES BIZOTS CREUSOT VS.</text:p>
          </table:table-cell>
        </table:table-row>
        <table:table-row>
          <table:table-cell>
            <text:p>Gronfier Gabin</text:p>
          </table:table-cell>
          <table:table-cell>
            <text:p>14/01/2026</text:p>
          </table:table-cell>
          <table:table-cell>
            <text:p>276480</text:p>
          </table:table-cell>
          <table:table-cell>
            <text:p>20/05/2013</text:p>
          </table:table-cell>
          <table:table-cell>
            <text:p>Non</text:p>
          </table:table-cell>
          <table:table-cell>
            <text:p>Minime</text:p>
          </table:table-cell>
          <table:table-cell>
            <text:p/>
          </table:table-cell>
          <table:table-cell>
            <text:p>NON NP CHPT</text:p>
          </table:table-cell>
        </table:table-row>
        <table:table-row>
          <table:table-cell>
            <text:p>JASINSKI Lucas</text:p>
          </table:table-cell>
          <table:table-cell>
            <text:p>28/12/2025</text:p>
          </table:table-cell>
          <table:table-cell>
            <text:p>581893</text:p>
          </table:table-cell>
          <table:table-cell>
            <text:p>15/03/2012</text:p>
          </table:table-cell>
          <table:table-cell>
            <text:p>Non</text:p>
          </table:table-cell>
          <table:table-cell>
            <text:p>Minime</text:p>
          </table:table-cell>
          <table:table-cell>
            <text:p/>
          </table:table-cell>
          <table:table-cell>
            <text:p>24/05/2026 SENNECEY LE GRAND Championnat Départemental Route FSGT 71 - 01/05/2026 VERDUN SUR LE DOUBS Route - 26/04/2026 LES BIZOTS CREUSOT VS - 19/04/2026 ST EUSEBE ECUISSES Route - 05/04/2026 ST MARTIN EN BRESSE Route.</text:p>
          </table:table-cell>
        </table:table-row>
        <table:table-row>
          <table:table-cell>
            <text:p>RENOUARD Vitali</text:p>
          </table:table-cell>
          <table:table-cell>
            <text:p>23/12/2025</text:p>
          </table:table-cell>
          <table:table-cell>
            <text:p>408903</text:p>
          </table:table-cell>
          <table:table-cell>
            <text:p>03/11/2012</text:p>
          </table:table-cell>
          <table:table-cell>
            <text:p>Oui</text:p>
          </table:table-cell>
          <table:table-cell>
            <text:p>Minime</text:p>
          </table:table-cell>
          <table:table-cell>
            <text:p/>
          </table:table-cell>
          <table:table-cell>
            <text:p>24/05/2026 SENNECEY LE GRAND Championnat Départemental Route FSGT 71 - 14/05/2026 LE BREUIL CREUSOT VS Route - 10/05/2026 FORLEANS Championnat Régional Route FSGT BFC - 08/05/2026 GENELARD ASPTT CHALON Route - 26/04/2026 LES BIZOTS CREUSOT VS.</text:p>
          </table:table-cell>
        </table:table-row>
      </table:table>
      <table:table table:name="Min_F">
        <table:table-row>
          <table:table-cell>
            <text:p>Noms - Prénoms *</text:p>
          </table:table-cell>
          <table:table-cell>
            <text:p>Date de délivrance *</text:p>
          </table:table-cell>
          <table:table-cell>
            <text:p>N° licence FSGT 2026 *</text:p>
          </table:table-cell>
          <table:table-cell>
            <text:p>Date de naissance *</text:p>
          </table:table-cell>
          <table:table-cell>
            <text:p>multi licencié oui / non *</text:p>
          </table:table-cell>
          <table:table-cell>
            <text:p>catégorie</text:p>
          </table:table-cell>
          <table:table-cell>
            <text:p>titre route 2026*</text:p>
          </table:table-cell>
          <table:table-cell>
            <text:p>Participations</text:p>
          </table:table-cell>
        </table:table-row>
        <table:table-row>
          <table:table-cell>
            <text:p>DUCOTE Laurine</text:p>
          </table:table-cell>
          <table:table-cell>
            <text:p>11/12/2025</text:p>
          </table:table-cell>
          <table:table-cell>
            <text:p>172334</text:p>
          </table:table-cell>
          <table:table-cell>
            <text:p>04/12/2012</text:p>
          </table:table-cell>
          <table:table-cell>
            <text:p>Oui</text:p>
          </table:table-cell>
          <table:table-cell>
            <text:p>Minime F</text:p>
          </table:table-cell>
          <table:table-cell>
            <text:p>CHAMPIONNE REGIONALE</text:p>
          </table:table-cell>
          <table:table-cell>
            <text:p>24/05/2026 SENNECEY LE GRAND Championnat Départemental Route FSGT 71 - 14/05/2026 LE BREUIL CREUSOT VS Route - 10/05/2026 FORLEANS Championnat Régional Route FSGT BFC - 08/05/2026 GENELARD ASPTT CHALON Route - 03/05/2026 GRANGES Route.</text:p>
          </table:table-cell>
        </table:table-row>
        <table:table-row>
          <table:table-cell>
            <text:p>LAROCHE Hélona</text:p>
          </table:table-cell>
          <table:table-cell>
            <text:p>28/12/2025</text:p>
          </table:table-cell>
          <table:table-cell>
            <text:p>581903</text:p>
          </table:table-cell>
          <table:table-cell>
            <text:p>21/11/2013</text:p>
          </table:table-cell>
          <table:table-cell>
            <text:p>Non</text:p>
          </table:table-cell>
          <table:table-cell>
            <text:p>Minime F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10/05/2026 FORLEANS Championnat Régional Route FSGT BFC - 08/05/2026 GENELARD ASPTT CHALON Route.</text:p>
          </table:table-cell>
        </table:table-row>
        <table:table-row>
          <table:table-cell>
            <text:p>MORNAT Mathilde</text:p>
          </table:table-cell>
          <table:table-cell>
            <text:p>18/01/2026</text:p>
          </table:table-cell>
          <table:table-cell>
            <text:p>171520</text:p>
          </table:table-cell>
          <table:table-cell>
            <text:p>21/06/2012</text:p>
          </table:table-cell>
          <table:table-cell>
            <text:p>Non</text:p>
          </table:table-cell>
          <table:table-cell>
            <text:p>Minime F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10/05/2026 FORLEANS Championnat Régional Route FSGT BFC - 03/05/2026 GRANGES Route.</text:p>
          </table:table-cell>
        </table:table-row>
      </table:table>
      <table:table table:name="Cad_G">
        <table:table-row>
          <table:table-cell>
            <text:p>Noms - Prénoms *</text:p>
          </table:table-cell>
          <table:table-cell>
            <text:p>Date de délivrance *</text:p>
          </table:table-cell>
          <table:table-cell>
            <text:p>N° licence FSGT 2026 *</text:p>
          </table:table-cell>
          <table:table-cell>
            <text:p>Date de naissance *</text:p>
          </table:table-cell>
          <table:table-cell>
            <text:p>multi licencié oui / non *</text:p>
          </table:table-cell>
          <table:table-cell>
            <text:p>catégorie</text:p>
          </table:table-cell>
          <table:table-cell>
            <text:p>titre route 2026*</text:p>
          </table:table-cell>
          <table:table-cell>
            <text:p>Participations</text:p>
          </table:table-cell>
        </table:table-row>
        <table:table-row>
          <table:table-cell>
            <text:p>ANGEVELLE Athérys</text:p>
          </table:table-cell>
          <table:table-cell>
            <text:p>16/12/2025</text:p>
          </table:table-cell>
          <table:table-cell>
            <text:p>530753</text:p>
          </table:table-cell>
          <table:table-cell>
            <text:p>13/01/2011</text:p>
          </table:table-cell>
          <table:table-cell>
            <text:p>Non</text:p>
          </table:table-cell>
          <table:table-cell>
            <text:p>Cadet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03/05/2026 GRANGES Route - 01/05/2026 VERDUN SUR LE DOUBS Route - 19/04/2026 ST EUSEBE ECUISSES Route - 11/04/2026 CHATENOY EN BRESSE ST MARCEL Route - 05/04/2026 ST MARTIN EN BRESSE Route.</text:p>
          </table:table-cell>
        </table:table-row>
        <table:table-row>
          <table:table-cell>
            <text:p>BERTHAUT ABEL</text:p>
          </table:table-cell>
          <table:table-cell>
            <text:p>08/03/2026</text:p>
          </table:table-cell>
          <table:table-cell>
            <text:p>591293</text:p>
          </table:table-cell>
          <table:table-cell>
            <text:p>10/04/2011</text:p>
          </table:table-cell>
          <table:table-cell>
            <text:p>Non</text:p>
          </table:table-cell>
          <table:table-cell>
            <text:p>Cadet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03/05/2026 GRANGES Route - 19/04/2026 ST EUSEBE ECUISSES Route - 11/04/2026 CHATENOY EN BRESSE ST MARCEL Route - 05/04/2026 ST MARTIN EN BRESSE Route - 21/03/2026 ST MARTIN EN GATINOIS VS CHALON Route.</text:p>
          </table:table-cell>
        </table:table-row>
        <table:table-row>
          <table:table-cell>
            <text:p>BONIN Justin</text:p>
          </table:table-cell>
          <table:table-cell>
            <text:p>23/12/2025</text:p>
          </table:table-cell>
          <table:table-cell>
            <text:p>309348</text:p>
          </table:table-cell>
          <table:table-cell>
            <text:p>18/08/2010</text:p>
          </table:table-cell>
          <table:table-cell>
            <text:p>Non</text:p>
          </table:table-cell>
          <table:table-cell>
            <text:p>Cadet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01/05/2026 VERDUN SUR LE DOUBS Route - 26/04/2026 LES BIZOTS CREUSOT VS - 19/04/2026 ST EUSEBE ECUISSES Route - 11/04/2026 CHATENOY EN BRESSE ST MARCEL Route - 05/04/2026 ST MARTIN EN BRESSE Route - 28/03/2026 VARENNES ST SAUVEUR Route.</text:p>
          </table:table-cell>
        </table:table-row>
        <table:table-row>
          <table:table-cell>
            <text:p>FEVRAT Paul</text:p>
          </table:table-cell>
          <table:table-cell>
            <text:p>15/12/2025</text:p>
          </table:table-cell>
          <table:table-cell>
            <text:p>361960</text:p>
          </table:table-cell>
          <table:table-cell>
            <text:p>15/09/2011</text:p>
          </table:table-cell>
          <table:table-cell>
            <text:p>Oui</text:p>
          </table:table-cell>
          <table:table-cell>
            <text:p>Cadet</text:p>
          </table:table-cell>
          <table:table-cell>
            <text:p/>
          </table:table-cell>
          <table:table-cell>
            <text:p>24/05/2026 SENNECEY LE GRAND Championnat Départemental Route FSGT 71 - 14/05/2026 LE BREUIL CREUSOT VS Route - 08/05/2026 GENELARD ASPTT CHALON Route - 01/05/2026 VERDUN SUR LE DOUBS Route - 26/04/2026 LES BIZOTS CREUSOT VS - 21/03/2026 ST MARTIN EN GATINOIS VS CHALON Route - 14/03/2026 Jully les BUXY Route - 07/03/2026 VERZE FLACE Route.</text:p>
          </table:table-cell>
        </table:table-row>
        <table:table-row>
          <table:table-cell>
            <text:p>GENETET Mael</text:p>
          </table:table-cell>
          <table:table-cell>
            <text:p>11/12/2025</text:p>
          </table:table-cell>
          <table:table-cell>
            <text:p>460790</text:p>
          </table:table-cell>
          <table:table-cell>
            <text:p>06/08/2011</text:p>
          </table:table-cell>
          <table:table-cell>
            <text:p>Oui</text:p>
          </table:table-cell>
          <table:table-cell>
            <text:p>Cadet</text:p>
          </table:table-cell>
          <table:table-cell>
            <text:p/>
          </table:table-cell>
          <table:table-cell>
            <text:p>NON NP CHPT</text:p>
          </table:table-cell>
        </table:table-row>
        <table:table-row>
          <table:table-cell>
            <text:p>JOLY Rémi</text:p>
          </table:table-cell>
          <table:table-cell>
            <text:p>23/12/2025</text:p>
          </table:table-cell>
          <table:table-cell>
            <text:p>309345</text:p>
          </table:table-cell>
          <table:table-cell>
            <text:p>29/11/2010</text:p>
          </table:table-cell>
          <table:table-cell>
            <text:p>Oui</text:p>
          </table:table-cell>
          <table:table-cell>
            <text:p>Cadet</text:p>
          </table:table-cell>
          <table:table-cell>
            <text:p>CHAMPION REGIONAL</text:p>
          </table:table-cell>
          <table:table-cell>
            <text:p>24/05/2026 SENNECEY LE GRAND Championnat Départemental Route FSGT 71 - 16/05/2026 BAUDRIERES ST MARCEL Route - 14/05/2026 LE BREUIL CREUSOT VS Route - 10/05/2026 FORLEANS Championnat Régional Route FSGT BFC - 26/04/2026 LES BIZOTS CREUSOT VS - 11/04/2026 CHATENOY EN BRESSE ST MARCEL Route - 05/04/2026 ST MARTIN EN BRESSE Route - 28/03/2026 VARENNES ST SAUVEUR Route.</text:p>
          </table:table-cell>
        </table:table-row>
        <table:table-row>
          <table:table-cell>
            <text:p>LARDY MAXENCE</text:p>
          </table:table-cell>
          <table:table-cell>
            <text:p>14/01/2026</text:p>
          </table:table-cell>
          <table:table-cell>
            <text:p>309289</text:p>
          </table:table-cell>
          <table:table-cell>
            <text:p>29/01/2010</text:p>
          </table:table-cell>
          <table:table-cell>
            <text:p>Oui</text:p>
          </table:table-cell>
          <table:table-cell>
            <text:p>Cadet</text:p>
          </table:table-cell>
          <table:table-cell>
            <text:p/>
          </table:table-cell>
          <table:table-cell>
            <text:p>24/05/2026 SENNECEY LE GRAND Championnat Départemental Route FSGT 71 - 10/05/2026 FORLEANS Championnat Régional Route FSGT BFC - 03/05/2026 GRANGES Route - 26/04/2026 LES BIZOTS CREUSOT VS - 05/04/2026 ST MARTIN EN BRESSE Route - 14/07/2025 LUZY Route - 28/06/2025 NANTON VS CHALON Clm - 22/06/2025 LOUHANS Route.</text:p>
          </table:table-cell>
        </table:table-row>
      </table:table>
      <table:table table:name="Jun_H">
        <table:table-row>
          <table:table-cell>
            <text:p>Noms - Prénoms *</text:p>
          </table:table-cell>
          <table:table-cell>
            <text:p>Date de délivrance *</text:p>
          </table:table-cell>
          <table:table-cell>
            <text:p>N° licence FSGT 2026 *</text:p>
          </table:table-cell>
          <table:table-cell>
            <text:p>Date de naissance *</text:p>
          </table:table-cell>
          <table:table-cell>
            <text:p>multi licencié oui / non *</text:p>
          </table:table-cell>
          <table:table-cell>
            <text:p>catégorie</text:p>
          </table:table-cell>
          <table:table-cell>
            <text:p>titre route 2026*</text:p>
          </table:table-cell>
          <table:table-cell>
            <text:p>Participations</text:p>
          </table:table-cell>
        </table:table-row>
        <table:table-row>
          <table:table-cell>
            <text:p>FEVRE Raphaêl</text:p>
          </table:table-cell>
          <table:table-cell>
            <text:p>12/01/2026</text:p>
          </table:table-cell>
          <table:table-cell>
            <text:p>361590</text:p>
          </table:table-cell>
          <table:table-cell>
            <text:p>06/04/2009</text:p>
          </table:table-cell>
          <table:table-cell>
            <text:p>Oui</text:p>
          </table:table-cell>
          <table:table-cell>
            <text:p>Junior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03/05/2026 GRANGES Route - 01/05/2026 VERDUN SUR LE DOUBS Route - 11/04/2026 CHATENOY EN BRESSE ST MARCEL Route - 05/04/2026 ST MARTIN EN BRESSE Route - 28/03/2026 VARENNES ST SAUVEUR Route - 07/03/2026 VERZE FLACE Route.</text:p>
          </table:table-cell>
        </table:table-row>
        <table:table-row>
          <table:table-cell>
            <text:p>LE BON Brieg</text:p>
          </table:table-cell>
          <table:table-cell>
            <text:p>23/12/2025</text:p>
          </table:table-cell>
          <table:table-cell>
            <text:p>171644</text:p>
          </table:table-cell>
          <table:table-cell>
            <text:p>01/10/2008</text:p>
          </table:table-cell>
          <table:table-cell>
            <text:p>Oui</text:p>
          </table:table-cell>
          <table:table-cell>
            <text:p>Junior</text:p>
          </table:table-cell>
          <table:table-cell>
            <text:p/>
          </table:table-cell>
          <table:table-cell>
            <text:p>24/05/2026 SENNECEY LE GRAND Championnat Départemental Route FSGT 71 - 14/05/2026 LE BREUIL CREUSOT VS Route - 26/04/2026 LES BIZOTS CREUSOT VS - 19/04/2026 ST EUSEBE ECUISSES Route - 05/04/2026 ST MARTIN EN BRESSE Route - 28/03/2026 VARENNES ST SAUVEUR Route - 28/02/2026 ECUELLES VERDUN Route - 11/10/2025 BUXY Clm.</text:p>
          </table:table-cell>
        </table:table-row>
        <table:table-row>
          <table:table-cell>
            <text:p>Lemaitre julian</text:p>
          </table:table-cell>
          <table:table-cell>
            <text:p>11/12/2025</text:p>
          </table:table-cell>
          <table:table-cell>
            <text:p>171305</text:p>
          </table:table-cell>
          <table:table-cell>
            <text:p>29/02/2008</text:p>
          </table:table-cell>
          <table:table-cell>
            <text:p>Oui</text:p>
          </table:table-cell>
          <table:table-cell>
            <text:p>Junior</text:p>
          </table:table-cell>
          <table:table-cell>
            <text:p>CHAMPION DEPARTEMENTAL</text:p>
          </table:table-cell>
          <table:table-cell>
            <text:p>24/05/2026 SENNECEY LE GRAND Championnat Départemental Route FSGT 71 - 08/05/2026 GENELARD ASPTT CHALON Route - 19/04/2026 ST EUSEBE ECUISSES Route - 05/04/2026 ST MARTIN EN BRESSE Route - 28/03/2026 VARENNES ST SAUVEUR Route - 28/02/2026 ECUELLES VERDUN Route - 23/11/2025 CRAPA MONTCEAU CC - 11/10/2025 BUXY Clm.</text:p>
          </table:table-cell>
        </table:table-row>
        <table:table-row>
          <table:table-cell>
            <text:p>MAILLOT Maël</text:p>
          </table:table-cell>
          <table:table-cell>
            <text:p>20/02/2026</text:p>
          </table:table-cell>
          <table:table-cell>
            <text:p>524744</text:p>
          </table:table-cell>
          <table:table-cell>
            <text:p>13/03/2009</text:p>
          </table:table-cell>
          <table:table-cell>
            <text:p>Non</text:p>
          </table:table-cell>
          <table:table-cell>
            <text:p>Junior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0/05/2026 FORLEANS Championnat Régional Route FSGT BFC - 03/05/2026 GRANGES Route - 01/05/2026 VERDUN SUR LE DOUBS Route - 26/04/2026 LES BIZOTS CREUSOT VS - 19/04/2026 ST EUSEBE ECUISSES Route - 11/04/2026 CHATENOY EN BRESSE ST MARCEL Route.</text:p>
          </table:table-cell>
        </table:table-row>
        <table:table-row>
          <table:table-cell>
            <text:p>MARGUIN Baptiste</text:p>
          </table:table-cell>
          <table:table-cell>
            <text:p>23/12/2025</text:p>
          </table:table-cell>
          <table:table-cell>
            <text:p>171640</text:p>
          </table:table-cell>
          <table:table-cell>
            <text:p>06/02/2008</text:p>
          </table:table-cell>
          <table:table-cell>
            <text:p>Oui</text:p>
          </table:table-cell>
          <table:table-cell>
            <text:p>Junior</text:p>
          </table:table-cell>
          <table:table-cell>
            <text:p/>
          </table:table-cell>
          <table:table-cell>
            <text:p>24/05/2026 SENNECEY LE GRAND Championnat Départemental Route FSGT 71 - 14/05/2026 LE BREUIL CREUSOT VS Route - 11/04/2026 CHATENOY EN BRESSE ST MARCEL Route - 05/04/2026 ST MARTIN EN BRESSE Route - 28/03/2026 VARENNES ST SAUVEUR Route - 21/03/2026 ST MARTIN EN GATINOIS VS CHALON Route - 14/03/2026 JULLY LES BUXY Route - 14/09/2025 OUROUX ST MARCEL Clm.</text:p>
          </table:table-cell>
        </table:table-row>
        <table:table-row>
          <table:table-cell>
            <text:p>MARGUIN Damien</text:p>
          </table:table-cell>
          <table:table-cell>
            <text:p>23/12/2025</text:p>
          </table:table-cell>
          <table:table-cell>
            <text:p>171641</text:p>
          </table:table-cell>
          <table:table-cell>
            <text:p>06/02/2008</text:p>
          </table:table-cell>
          <table:table-cell>
            <text:p>Oui</text:p>
          </table:table-cell>
          <table:table-cell>
            <text:p>Junior</text:p>
          </table:table-cell>
          <table:table-cell>
            <text:p/>
          </table:table-cell>
          <table:table-cell>
            <text:p>24/05/2026 SENNECEY LE GRAND Championnat Départemental Route FSGT 71 - 14/05/2026 LE BREUIL CREUSOT VS Route - 03/05/2026 GRANGES Route - 26/04/2026 LES BIZOTS CREUSOT VS - 19/04/2026 ST EUSEBE ECUISSES Route - 11/04/2026 CHATENOY EN BRESSE ST MARCEL Route - 05/04/2026 ST MARTIN EN BRESSE Route - 28/03/2026 VARENNES ST SAUVEUR Route.</text:p>
          </table:table-cell>
        </table:table-row>
        <table:table-row>
          <table:table-cell>
            <text:p>MEJNAOUI DRISS</text:p>
          </table:table-cell>
          <table:table-cell>
            <text:p>23/01/2026</text:p>
          </table:table-cell>
          <table:table-cell>
            <text:p>411370</text:p>
          </table:table-cell>
          <table:table-cell>
            <text:p>19/06/2009</text:p>
          </table:table-cell>
          <table:table-cell>
            <text:p>Oui</text:p>
          </table:table-cell>
          <table:table-cell>
            <text:p>Junior</text:p>
          </table:table-cell>
          <table:table-cell>
            <text:p>CHAMPION REGIONAL</text:p>
          </table:table-cell>
          <table:table-cell>
            <text:p>10/05/2026 FORLEANS Championnat Régional Route FSGT BFC - 08/05/2026 GENELARD ASPTT CHALON Route - 03/05/2026 GRANGES Route - 01/05/2026 VERDUN SUR LE DOUBS Route - 26/04/2026 LES BIZOTS CREUSOT VS - 19/04/2026 ST EUSEBE ECUISSES Route - 11/04/2026 CHATENOY EN BRESSE ST MARCEL Route - 21/03/2026 ST MARTIN EN GATINOIS VS CHALON Route.</text:p>
          </table:table-cell>
        </table:table-row>
      </table:table>
      <table:table table:name="Jun_F">
        <table:table-row>
          <table:table-cell>
            <text:p>Noms - Prénoms *</text:p>
          </table:table-cell>
          <table:table-cell>
            <text:p>Date de délivrance *</text:p>
          </table:table-cell>
          <table:table-cell>
            <text:p>N° licence FSGT 2026 *</text:p>
          </table:table-cell>
          <table:table-cell>
            <text:p>Date de naissance *</text:p>
          </table:table-cell>
          <table:table-cell>
            <text:p>multi licencié oui / non *</text:p>
          </table:table-cell>
          <table:table-cell>
            <text:p>catégorie</text:p>
          </table:table-cell>
          <table:table-cell>
            <text:p>titre route 2026*</text:p>
          </table:table-cell>
          <table:table-cell>
            <text:p>Participations</text:p>
          </table:table-cell>
        </table:table-row>
        <table:table-row>
          <table:table-cell>
            <text:p>DUCOTE Juline</text:p>
          </table:table-cell>
          <table:table-cell>
            <text:p>11/12/2025</text:p>
          </table:table-cell>
          <table:table-cell>
            <text:p>172335</text:p>
          </table:table-cell>
          <table:table-cell>
            <text:p>06/11/2008</text:p>
          </table:table-cell>
          <table:table-cell>
            <text:p>Oui</text:p>
          </table:table-cell>
          <table:table-cell>
            <text:p>Junior F</text:p>
          </table:table-cell>
          <table:table-cell>
            <text:p>CHAMPIONNE REGIONALE</text:p>
          </table:table-cell>
          <table:table-cell>
            <text:p>24/05/2026 SENNECEY LE GRAND Championnat Départemental Route FSGT 71 - 14/05/2026 LE BREUIL CREUSOT VS Route - 10/05/2026 FORLEANS Championnat Régional Route FSGT BFC - 08/05/2026 GENELARD ASPTT CHALON Route - 01/05/2026 VERDUN SUR LE DOUBS Route - 11/04/2026 CHATENOY EN BRESSE ST MARCEL Route - 05/04/2026 ST MARTIN EN BRESSE Route - 28/03/2026 VARENNES ST SAUVEUR Route.</text:p>
          </table:table-cell>
        </table:table-row>
      </table:table>
      <table:table table:name="Esp_H">
        <table:table-row>
          <table:table-cell>
            <text:p>Noms - Prénoms *</text:p>
          </table:table-cell>
          <table:table-cell>
            <text:p>Date de délivrance *</text:p>
          </table:table-cell>
          <table:table-cell>
            <text:p>N° licence FSGT 2026 *</text:p>
          </table:table-cell>
          <table:table-cell>
            <text:p>Date de naissance *</text:p>
          </table:table-cell>
          <table:table-cell>
            <text:p>multi licencié oui / non *</text:p>
          </table:table-cell>
          <table:table-cell>
            <text:p>catégorie</text:p>
          </table:table-cell>
          <table:table-cell>
            <text:p>titre route 2026*</text:p>
          </table:table-cell>
          <table:table-cell>
            <text:p>Participations</text:p>
          </table:table-cell>
        </table:table-row>
        <table:table-row>
          <table:table-cell>
            <text:p>ALENDA Nathan</text:p>
          </table:table-cell>
          <table:table-cell>
            <text:p>19/01/2026</text:p>
          </table:table-cell>
          <table:table-cell>
            <text:p>312587</text:p>
          </table:table-cell>
          <table:table-cell>
            <text:p>26/12/2006</text:p>
          </table:table-cell>
          <table:table-cell>
            <text:p>Oui</text:p>
          </table:table-cell>
          <table:table-cell>
            <text:p>Espoir</text:p>
          </table:table-cell>
          <table:table-cell>
            <text:p/>
          </table:table-cell>
          <table:table-cell>
            <text:p>24/05/2026 SENNECEY LE GRAND Championnat Départemental Route FSGT 71 - 14/05/2026 LE BREUIL CREUSOT VS Route - Le coureur n'a pas pu courir pour cause de blessure Le certificat médical à été joint à la commission FSGT71 - 28/02/2026 ECUELLES VERDUN Route - 13/09/2025 Prix du Parc Métropolitain de Parilly (Rhône) VCMB ACMV ECMVV Route - 28/06/2025 CLM NANTON VS CHALON Organisation - 22/06/2025 LOUHANS Route - 07/06/2025 TOUTENANT ST MARTIN CLM + Route.</text:p>
          </table:table-cell>
        </table:table-row>
        <table:table-row>
          <table:table-cell>
            <text:p>GIRARDEAU SULYVAN</text:p>
          </table:table-cell>
          <table:table-cell>
            <text:p>19/02/2026</text:p>
          </table:table-cell>
          <table:table-cell>
            <text:p>171747</text:p>
          </table:table-cell>
          <table:table-cell>
            <text:p>04/05/2006</text:p>
          </table:table-cell>
          <table:table-cell>
            <text:p>Oui</text:p>
          </table:table-cell>
          <table:table-cell>
            <text:p>Espoir</text:p>
          </table:table-cell>
          <table:table-cell>
            <text:p/>
          </table:table-cell>
          <table:table-cell>
            <text:p>24/05/2026 SENNECEY LE GRAND Championnat Départemental Route FSGT 71 - 03/05/2026 GRANGES Route - 01/05/2026 VERDUN SUR LE DOUBS Route - 19/04/2026 ST EUSEBE ECUISSES Route - 05/04/2026 ST MARTIN EN BRESSE Route - 21/03/2026 ST MARTIN EN GATINOIS VS CHALON Route - 14/03/2026 JULLY LES BUXY Route - 28/02/2026 ECUELLES VERDUN Route.</text:p>
          </table:table-cell>
        </table:table-row>
        <table:table-row>
          <table:table-cell>
            <text:p>GUICHARD Eliot</text:p>
          </table:table-cell>
          <table:table-cell>
            <text:p>27/01/2026</text:p>
          </table:table-cell>
          <table:table-cell>
            <text:p>467911</text:p>
          </table:table-cell>
          <table:table-cell>
            <text:p>18/07/2006</text:p>
          </table:table-cell>
          <table:table-cell>
            <text:p>Oui</text:p>
          </table:table-cell>
          <table:table-cell>
            <text:p>Espoir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9/04/2026 ST EUSEBE ECUISSES Route - 11/04/2026 CHATENOY EN BRESSE ST MARCEL Route - 28/03/2026 VARENNES ST SAUVEUR Route - 28/02/2026 ECUELLES VERDUN Route - 14/07/2025 LUZY Route - 28/06/2025 NANTON VS CHALON Clm.</text:p>
          </table:table-cell>
        </table:table-row>
        <table:table-row>
          <table:table-cell>
            <text:p>REBILLARD Enzo</text:p>
          </table:table-cell>
          <table:table-cell>
            <text:p>23/12/2025</text:p>
          </table:table-cell>
          <table:table-cell>
            <text:p>171624</text:p>
          </table:table-cell>
          <table:table-cell>
            <text:p>22/09/2004</text:p>
          </table:table-cell>
          <table:table-cell>
            <text:p>Oui</text:p>
          </table:table-cell>
          <table:table-cell>
            <text:p>Espoir</text:p>
          </table:table-cell>
          <table:table-cell>
            <text:p/>
          </table:table-cell>
          <table:table-cell>
            <text:p>24/05/2026 SENNECEY LE GRAND Championnat Départemental Route FSGT 71 - 19/04/2026 ST EUSEBE ECUISSES Route - 05/04/2026 ST MARTIN EN BRESSE Route - 21/03/2026 ST MARTIN EN GATINOIS VS CHALON Route - 14/03/2026 JULLY LES BUXY Route - 28/02/2026 ECUELLES VERDUN Route - 07/09/2025 ST MARTIN EN BRESSE Clm - 07/06/2025 TOUTENANT ST MARTIN Route.</text:p>
          </table:table-cell>
        </table:table-row>
        <table:table-row>
          <table:table-cell>
            <text:p>VERRIEN Noé</text:p>
          </table:table-cell>
          <table:table-cell>
            <text:p>15/12/2025</text:p>
          </table:table-cell>
          <table:table-cell>
            <text:p>412187</text:p>
          </table:table-cell>
          <table:table-cell>
            <text:p>17/10/2026</text:p>
          </table:table-cell>
          <table:table-cell>
            <text:p>Oui</text:p>
          </table:table-cell>
          <table:table-cell>
            <text:p>Espoir</text:p>
          </table:table-cell>
          <table:table-cell>
            <text:p/>
          </table:table-cell>
          <table:table-cell>
            <text:p>24/05/2026 SENNECEY LE GRAND Championnat Départemental Route FSGT 71 - 14/05/2026 LE BREUIL CREUSOT VS Route - 03/05/2026 ST ETEINNE DU BOIS VIRAT TEAM Route - 26/04/2026 LES BIZOTS CREUSOT VS - 05/04/2026 ST MARTIN EN BRESSE Route - 29/03/2026 MEILLONNAS REVERMONT Route - 
14/03/2026 JULLY LES BUXY Route - 27/09/2025 Prix de Romans CC CHATILLON Route.</text:p>
          </table:table-cell>
        </table:table-row>
      </table:table>
      <table:table table:name="Sen_H">
        <table:table-row>
          <table:table-cell>
            <text:p>Noms - Prénoms *</text:p>
          </table:table-cell>
          <table:table-cell>
            <text:p>Date de délivrance *</text:p>
          </table:table-cell>
          <table:table-cell>
            <text:p>N° licence FSGT 2026 *</text:p>
          </table:table-cell>
          <table:table-cell>
            <text:p>Date de naissance *</text:p>
          </table:table-cell>
          <table:table-cell>
            <text:p>multi licencié oui / non *</text:p>
          </table:table-cell>
          <table:table-cell>
            <text:p>catégorie</text:p>
          </table:table-cell>
          <table:table-cell>
            <text:p>titre route 2026*</text:p>
          </table:table-cell>
          <table:table-cell>
            <text:p>Participations</text:p>
          </table:table-cell>
        </table:table-row>
        <table:table-row>
          <table:table-cell>
            <text:p>BIGARNET Matthieu</text:p>
          </table:table-cell>
          <table:table-cell>
            <text:p>10/12/2025</text:p>
          </table:table-cell>
          <table:table-cell>
            <text:p>310537</text:p>
          </table:table-cell>
          <table:table-cell>
            <text:p>28/01/1991</text:p>
          </table:table-cell>
          <table:table-cell>
            <text:p>Non</text:p>
          </table:table-cell>
          <table:table-cell>
            <text:p>Senior</text:p>
          </table:table-cell>
          <table:table-cell>
            <text:p/>
          </table:table-cell>
          <table:table-cell>
            <text:p>24/05/2026 SENNECEY LE GRAND Championnat Départemental Route FSGT 71 - 19/04/2026 ST EUSEBE ECUISSES Route - 11/04/2026 CHATENOY EN BRESSE ST MARCEL Route - 28/03/2026 VARENNES ST SAUVEUR Route - 07/03/2026 VERZE FLACE Route - 28/02/2026 ECUELLES VERDUN Route - 28/09/2026 VARENNES ST SAUVEUR Clm - 14/09/2026 OUROUX ST MARCEL Clm.</text:p>
          </table:table-cell>
        </table:table-row>
        <table:table-row>
          <table:table-cell>
            <text:p>MACIASZEK Guillaume</text:p>
          </table:table-cell>
          <table:table-cell>
            <text:p>12/12/2025</text:p>
          </table:table-cell>
          <table:table-cell>
            <text:p>171870</text:p>
          </table:table-cell>
          <table:table-cell>
            <text:p>04/03/2002</text:p>
          </table:table-cell>
          <table:table-cell>
            <text:p>Oui</text:p>
          </table:table-cell>
          <table:table-cell>
            <text:p>Senior</text:p>
          </table:table-cell>
          <table:table-cell>
            <text:p>CHAMPION DEPARTEMENTAL</text:p>
          </table:table-cell>
          <table:table-cell>
            <text:p>24/05/2026 SENNECEY LE GRAND Championnat Départemental Route FSGT 71 - 14/05/2026 LE BREUIL CREUSOT VS Route - 10/05/2026 FORLEANS Championnat Régional Route FSGT BFC - 01/05/2026 VERDUN SUR LE DOUBS Route - 26/04/2026 LES BIZOTS CREUSOT VS - 19/04/2026 ST EUSEBE ECUISSES Route - 05/04/2026 ST MARTIN EN BRESSE Route - 07/03/2026 VERZE FLACE Route.</text:p>
          </table:table-cell>
        </table:table-row>
        <table:table-row>
          <table:table-cell>
            <text:p>MANGINI Matteo</text:p>
          </table:table-cell>
          <table:table-cell>
            <text:p>15/12/2025</text:p>
          </table:table-cell>
          <table:table-cell>
            <text:p>277965</text:p>
          </table:table-cell>
          <table:table-cell>
            <text:p>24/10/2000</text:p>
          </table:table-cell>
          <table:table-cell>
            <text:p>Non</text:p>
          </table:table-cell>
          <table:table-cell>
            <text:p>Senior</text:p>
          </table:table-cell>
          <table:table-cell>
            <text:p/>
          </table:table-cell>
          <table:table-cell>
            <text:p>24/05/2026 SENNECEY LE GRAND Championnat Départemental Route FSGT 71 - 14/05/2026 LE BREUIL CREUSOT VS Route - 01/05/2026 VERDUN SUR LE DOUBS Route - 26/04/2026 LES BIZOTS CREUSOT VS - 19/04/2026 ST EUSEBE ECUISSES Route - 05/04/2026 ST MARTIN EN BRESSE Route - 29/03/2026 MEILLONNAS (Ain) REVERMONT Route - 21/03/2026 ST MARTIN EN GATINOIS VS CHALON Route.</text:p>
          </table:table-cell>
        </table:table-row>
        <table:table-row>
          <table:table-cell>
            <text:p>Rabut Lucas</text:p>
          </table:table-cell>
          <table:table-cell>
            <text:p>14/12/2025</text:p>
          </table:table-cell>
          <table:table-cell>
            <text:p>172542</text:p>
          </table:table-cell>
          <table:table-cell>
            <text:p>22/06/2003</text:p>
          </table:table-cell>
          <table:table-cell>
            <text:p>Oui</text:p>
          </table:table-cell>
          <table:table-cell>
            <text:p>Senior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01/05/2026 VERDUN SUR LE DOUBS Route - 05/04/2026 ST MARTIN EN BRESSE Route - 21/03/2026 ST MARTIN EN GATINOIS VS CHALON Route - 14/03/2026 JULLY LES BUXY Route - 28/02/2026 ECUELLES VERDUN Route - 07/09/2025 ST MARTIN EN BRESSE Clm.</text:p>
          </table:table-cell>
        </table:table-row>
        <table:table-row>
          <table:table-cell>
            <text:p>REICHHART Victor</text:p>
          </table:table-cell>
          <table:table-cell>
            <text:p>12/02/2026</text:p>
          </table:table-cell>
          <table:table-cell>
            <text:p>353674</text:p>
          </table:table-cell>
          <table:table-cell>
            <text:p>27/03/1996</text:p>
          </table:table-cell>
          <table:table-cell>
            <text:p>Oui</text:p>
          </table:table-cell>
          <table:table-cell>
            <text:p>Senior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10/05/2026 FORLEANS Championnat Régional Route FSGT BFC - 08/05/2026 GENELARD ASPTT CHALON Route - 01/05/2026 VERDUN SUR LE DOUBS Route - 26/04/2026 LES BIZOTS CREUSOT VS - 19/04/2026 ST EUSEBE ECUISSES Route.</text:p>
          </table:table-cell>
        </table:table-row>
        <table:table-row>
          <table:table-cell>
            <text:p>RODET Thibaut</text:p>
          </table:table-cell>
          <table:table-cell>
            <text:p>11/12/2025</text:p>
          </table:table-cell>
          <table:table-cell>
            <text:p>172330</text:p>
          </table:table-cell>
          <table:table-cell>
            <text:p>03/02/1989</text:p>
          </table:table-cell>
          <table:table-cell>
            <text:p>Oui</text:p>
          </table:table-cell>
          <table:table-cell>
            <text:p>Senior</text:p>
          </table:table-cell>
          <table:table-cell>
            <text:p/>
          </table:table-cell>
          <table:table-cell>
            <text:p>24/05/2026 SENNECEY LE GRAND Championnat Départemental Route FSGT 71 - 03/05/2026 GRANGES Route - 01/05/2026 VERDUN SUR LE DOUBS Route - 19/04/2026 ST EUSEBE ECUISSES Route - 11/04/2026 CHATENOY EN BRESSE ST MARCEL Route - 05/04/2026 ST MARTIN EN BRESSE Route - 21/03/2026 ST MARTIN EN GATINOIS VS CHALON Route - 07/03/2026 VERZE FLACE Route.</text:p>
          </table:table-cell>
        </table:table-row>
      </table:table>
      <table:table table:name="Vet_H">
        <table:table-row>
          <table:table-cell>
            <text:p>Noms - Prénoms *</text:p>
          </table:table-cell>
          <table:table-cell>
            <text:p>Date de délivrance *</text:p>
          </table:table-cell>
          <table:table-cell>
            <text:p>N° licence FSGT 2026 *</text:p>
          </table:table-cell>
          <table:table-cell>
            <text:p>Date de naissance *</text:p>
          </table:table-cell>
          <table:table-cell>
            <text:p>multi licencié oui / non *</text:p>
          </table:table-cell>
          <table:table-cell>
            <text:p>catégorie</text:p>
          </table:table-cell>
          <table:table-cell>
            <text:p>titre route 2026*</text:p>
          </table:table-cell>
          <table:table-cell>
            <text:p>Participations</text:p>
          </table:table-cell>
        </table:table-row>
        <table:table-row>
          <table:table-cell>
            <text:p>CASCIELLO Geoffrey</text:p>
          </table:table-cell>
          <table:table-cell>
            <text:p>28/12/2025</text:p>
          </table:table-cell>
          <table:table-cell>
            <text:p>172549</text:p>
          </table:table-cell>
          <table:table-cell>
            <text:p>11/06/1986</text:p>
          </table:table-cell>
          <table:table-cell>
            <text:p>Non</text:p>
          </table:table-cell>
          <table:table-cell>
            <text:p>Vétéra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0/05/2026 FORLEANS Championnat Régional Route FSGT BFC - 08/05/2026 GENELARD ASPTT CHALON Route -01/05/2026 VERDUN SUR LE DOUBS Route - 26/04/2026 LES BIZOTS CREUSOT VS - 19/04/2026 ST EUSEBE ECUISSES Route - 11/04/2026 CHATENOY EN BRESSE ST MARCEL Route.</text:p>
          </table:table-cell>
        </table:table-row>
        <table:table-row>
          <table:table-cell>
            <text:p>DESGOUILLES Julien</text:p>
          </table:table-cell>
          <table:table-cell>
            <text:p>06/01/2026</text:p>
          </table:table-cell>
          <table:table-cell>
            <text:p>272713</text:p>
          </table:table-cell>
          <table:table-cell>
            <text:p>11/02/1985</text:p>
          </table:table-cell>
          <table:table-cell>
            <text:p>Oui</text:p>
          </table:table-cell>
          <table:table-cell>
            <text:p>Vétéran</text:p>
          </table:table-cell>
          <table:table-cell>
            <text:p/>
          </table:table-cell>
          <table:table-cell>
            <text:p>24/05/2026 SENNECEY LE GRAND Championnat Départemental Route FSGT 71 - 10/05/2026 FORLEANS Championnat Régional Route FSGT BFC - 08/05/2026 GENELARD ASPTT CHALON Route - 26/04/2026 LES BIZOTS CREUSOT VS - 19/04/2026 ST EUSEBE ECUISSES Route - 11/04/2026 CHATENOY EN BRESSE ST MARCEL Route - 05/04/2026 ST MARTIN EN BRESSE Route - 28/02/2026 ECUELLES VERDUN Route.</text:p>
          </table:table-cell>
        </table:table-row>
        <table:table-row>
          <table:table-cell>
            <text:p>DESTRIGNEVILLE Vincent</text:p>
          </table:table-cell>
          <table:table-cell>
            <text:p>04/02/2026</text:p>
          </table:table-cell>
          <table:table-cell>
            <text:p>529388</text:p>
          </table:table-cell>
          <table:table-cell>
            <text:p>22/11/1982</text:p>
          </table:table-cell>
          <table:table-cell>
            <text:p>Non</text:p>
          </table:table-cell>
          <table:table-cell>
            <text:p>Vétéra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0/05/2026 FORLEANS Championnat Régional Route FSGT BFC - 01/05/2026 VERDUN SUR LE DOUBS Route - 26/04/2026 LES BIZOTS CREUSOT VS - 19/04/2026 ST EUSEBE ECUISSES Route - 11/04/2026 CHATENOY EN BRESSE ST MARCEL Route - 28/03/2026 VARENNES ST SAUVEUR Route.</text:p>
          </table:table-cell>
        </table:table-row>
        <table:table-row>
          <table:table-cell>
            <text:p>HONORÉ Jean Baptiste</text:p>
          </table:table-cell>
          <table:table-cell>
            <text:p>12/12/2025</text:p>
          </table:table-cell>
          <table:table-cell>
            <text:p>171855</text:p>
          </table:table-cell>
          <table:table-cell>
            <text:p>21/08/1980</text:p>
          </table:table-cell>
          <table:table-cell>
            <text:p>Non</text:p>
          </table:table-cell>
          <table:table-cell>
            <text:p>Vétéran</text:p>
          </table:table-cell>
          <table:table-cell>
            <text:p/>
          </table:table-cell>
          <table:table-cell>
            <text:p>24/05/2026 SENNECEY LE GRAND Championnat Départemental Route FSGT 71 - 05/04/2026 ST MARTIN EN BRESSE Route - 21/03/2026 ST MARTIN EN GATINOIS VS CHALON Route -14/03/2026 JULLY LES BUXY Route - 28/02/2026 ECUELLES VERDUN Route - 14/09/2025 OUROUX ST MARCEL Clm - 07/09/2025 ST MARTIN EN BRESSE Clm - 07/06/2025 TOUTENANT ST MARTIN EN BRESSE Route.</text:p>
          </table:table-cell>
        </table:table-row>
        <table:table-row>
          <table:table-cell>
            <text:p>LUCA ludovic</text:p>
          </table:table-cell>
          <table:table-cell>
            <text:p>17/12/2025</text:p>
          </table:table-cell>
          <table:table-cell>
            <text:p>303580</text:p>
          </table:table-cell>
          <table:table-cell>
            <text:p>24/06/1978</text:p>
          </table:table-cell>
          <table:table-cell>
            <text:p>Oui</text:p>
          </table:table-cell>
          <table:table-cell>
            <text:p>Vétéran</text:p>
          </table:table-cell>
          <table:table-cell>
            <text:p/>
          </table:table-cell>
          <table:table-cell>
            <text:p>24/05/2026 SENNECEY LE GRAND Championnat Départemental Route FSGT 71 - 08/05/2026 GENELARD ASPTT CHALON Route - 01/05/2026 VERDUN SUR LE DOUBS Route - 26/04/2026 LES BIZOTS CREUSOT VS - 19/04/2026 ST EUSEBE ECUISSES Route - 11/04/2026 CHATENOY EN BRESSE ST MARCEL Route - 28/02/2026 ECUELLES VERDUN Route - 17/08/2025 LAROCHEMILLAY LUZY Route.</text:p>
          </table:table-cell>
        </table:table-row>
        <table:table-row>
          <table:table-cell>
            <text:p>TALPIN Frédéric</text:p>
          </table:table-cell>
          <table:table-cell>
            <text:p>06/01/2026</text:p>
          </table:table-cell>
          <table:table-cell>
            <text:p>360614</text:p>
          </table:table-cell>
          <table:table-cell>
            <text:p>09/06/1981</text:p>
          </table:table-cell>
          <table:table-cell>
            <text:p>Non</text:p>
          </table:table-cell>
          <table:table-cell>
            <text:p>Vétéran</text:p>
          </table:table-cell>
          <table:table-cell>
            <text:p>CHAMPION REGIONAL</text:p>
          </table:table-cell>
          <table:table-cell>
            <text:p>24/05/2026 SENNECEY LE GRAND Championnat Départemental Route FSGT 71 - 16/05/2026 BAUDRIERES ST MARCEL Route - 14/05/2026 LE BREUIL CREUSOT VS Route - 10/05/2026 FORLEANS Championnat Régional Route FSGT BFC - 08/05/2026 GENELARD ASPTT CHALON Route - 03/05/2026 GRANGES Route - 26/04/2026 LES BIZOTS CREUSOT VS - 19/04/2026 ST EUSEBE ECUISSES Route.</text:p>
          </table:table-cell>
        </table:table-row>
        <table:table-row>
          <table:table-cell>
            <text:p>ZOCCOLANTE David</text:p>
          </table:table-cell>
          <table:table-cell>
            <text:p>23/12/2025</text:p>
          </table:table-cell>
          <table:table-cell>
            <text:p>172540</text:p>
          </table:table-cell>
          <table:table-cell>
            <text:p>21/12/1982</text:p>
          </table:table-cell>
          <table:table-cell>
            <text:p>Oui</text:p>
          </table:table-cell>
          <table:table-cell>
            <text:p>Vétéran</text:p>
          </table:table-cell>
          <table:table-cell>
            <text:p/>
          </table:table-cell>
          <table:table-cell>
            <text:p>24/05/2026 SENNECEY LE GRAND Championnat Départemental Route FSGT 71 - 14/05/2026 LE BREUIL CREUSOT VS Route - 10/05/2026 FORLEANS Championnat Régional Route FSGT BFC - 08/05/2026 GENELARD ASPTT CHALON Route - 03/05/2026 GRANGES Route - 01/05/2026 VERDUN SUR LE DOUBS Route - 26/04/2026 LES BIZOTS CREUSOT VS - 19/04/2026 ST EUSEBE ECUISSES Route.</text:p>
          </table:table-cell>
        </table:table-row>
      </table:table>
      <table:table table:name="SV_H">
        <table:table-row>
          <table:table-cell>
            <text:p>Noms - Prénoms *</text:p>
          </table:table-cell>
          <table:table-cell>
            <text:p>Date de délivrance *</text:p>
          </table:table-cell>
          <table:table-cell>
            <text:p>N° licence FSGT 2026 *</text:p>
          </table:table-cell>
          <table:table-cell>
            <text:p>Date de naissance *</text:p>
          </table:table-cell>
          <table:table-cell>
            <text:p>multi licencié oui / non *</text:p>
          </table:table-cell>
          <table:table-cell>
            <text:p>catégorie</text:p>
          </table:table-cell>
          <table:table-cell>
            <text:p>titre route 2026*</text:p>
          </table:table-cell>
          <table:table-cell>
            <text:p>Participations</text:p>
          </table:table-cell>
        </table:table-row>
        <table:table-row>
          <table:table-cell>
            <text:p>BEAUFILS Christophe</text:p>
          </table:table-cell>
          <table:table-cell>
            <text:p>15/12/2025</text:p>
          </table:table-cell>
          <table:table-cell>
            <text:p>172541</text:p>
          </table:table-cell>
          <table:table-cell>
            <text:p>26/03/1970</text:p>
          </table:table-cell>
          <table:table-cell>
            <text:p>Oui</text:p>
          </table:table-cell>
          <table:table-cell>
            <text:p>Super-Vétéra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08/05/2026 GENELARD ASPTT CHALON Route - 03/05/2026 GRANGES Route - 11/04/2026 CHATENOY EN BRESSE ST MARCEL Route - 05/04/2026 ST MARTIN EN BRESSE Route - 28/02/2026 ECUELLES VERDUN Route.</text:p>
          </table:table-cell>
        </table:table-row>
        <table:table-row>
          <table:table-cell>
            <text:p>BUFFET Sylvain</text:p>
          </table:table-cell>
          <table:table-cell>
            <text:p>05/01/2026</text:p>
          </table:table-cell>
          <table:table-cell>
            <text:p>135890</text:p>
          </table:table-cell>
          <table:table-cell>
            <text:p>14/03/1970</text:p>
          </table:table-cell>
          <table:table-cell>
            <text:p>Oui</text:p>
          </table:table-cell>
          <table:table-cell>
            <text:p>Super-Vétéran</text:p>
          </table:table-cell>
          <table:table-cell>
            <text:p/>
          </table:table-cell>
          <table:table-cell>
            <text:p>24/05/2026 SENNECEY LE GRAND Championnat Départemental Route FSGT 71 - 01/05/2026 Prix de Vénisseux RHONE Route - 
14/05/2026 LE BREUIL CREUSOT VS Route - 11/04/2026 CHATENOY EN BRESSE ST MARCEL Route - 04/04/2026 Vougy LOIRE Route - 28/03/2026 VARENNES ST SAUVEUR Route - 14/03/2026 JULLY LES BUXY Route - 10/01/2026 Chevigny saint Sauveur COTE D'OR CC.</text:p>
          </table:table-cell>
        </table:table-row>
        <table:table-row>
          <table:table-cell>
            <text:p>CHARLOT Denis</text:p>
          </table:table-cell>
          <table:table-cell>
            <text:p>30/12/2025</text:p>
          </table:table-cell>
          <table:table-cell>
            <text:p>171386</text:p>
          </table:table-cell>
          <table:table-cell>
            <text:p>15/11/1971</text:p>
          </table:table-cell>
          <table:table-cell>
            <text:p>Oui</text:p>
          </table:table-cell>
          <table:table-cell>
            <text:p>Super-Vétéra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0/05/2026 FORLEANS Championnat Régional Route FSGT BFC - 29/03/2026 Meillonnas 01 REVERMONT Route - 28/03/2026 VARENNES ST SAUVEUR Route - 14/03/2026 JULLY LES BUXY Route - 07/03/2026 VERZE FLACE Route - 28/06/2025 Nanton VS CHALON Clm.</text:p>
          </table:table-cell>
        </table:table-row>
        <table:table-row>
          <table:table-cell>
            <text:p>COULAUD Eric</text:p>
          </table:table-cell>
          <table:table-cell>
            <text:p>04/01/2026</text:p>
          </table:table-cell>
          <table:table-cell>
            <text:p>171390</text:p>
          </table:table-cell>
          <table:table-cell>
            <text:p>02/10/1968</text:p>
          </table:table-cell>
          <table:table-cell>
            <text:p>Non</text:p>
          </table:table-cell>
          <table:table-cell>
            <text:p>Super-Vétéran</text:p>
          </table:table-cell>
          <table:table-cell>
            <text:p/>
          </table:table-cell>
          <table:table-cell>
            <text:p>24/05/2026 SENNECEY LE GRAND Championnat Départemental Route FSGT 71 - 10/05/2026 FORLEANS Championnat Régional Route FSGT BFC - 08/05/2026 GENELARD ASPTT CHALON Route - 01/05/2026 VERDUN SUR LE DOUBS Route - 26/04/2026 LES BIZOTS CREUSOT VS - 11/04/2026 CHATENOY EN BRESSE ST MARCEL Route - 07/03/2026 VERZE FLACE Route - 17/08/2025 Larochemillay LUZY Route.</text:p>
          </table:table-cell>
        </table:table-row>
        <table:table-row>
          <table:table-cell>
            <text:p>HURET Éric</text:p>
          </table:table-cell>
          <table:table-cell>
            <text:p>12/02/2026</text:p>
          </table:table-cell>
          <table:table-cell>
            <text:p>171874</text:p>
          </table:table-cell>
          <table:table-cell>
            <text:p>01/08/1971</text:p>
          </table:table-cell>
          <table:table-cell>
            <text:p>Oui</text:p>
          </table:table-cell>
          <table:table-cell>
            <text:p>Super-Vétéra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10/05/2026 FORLEANS Championnat Régional Route FSGT BFC - 08/05/2026 GENELARD ASPTT CHALON Route - 03/05/2026 GRANGES Route - 01/05/2026 VERDUN SUR LE DOUBS Route - 26/04/2026 LES BIZOTS CREUSOT VS.</text:p>
          </table:table-cell>
        </table:table-row>
        <table:table-row>
          <table:table-cell>
            <text:p>JOLIVOT Sébastien</text:p>
          </table:table-cell>
          <table:table-cell>
            <text:p>12/02/2026</text:p>
          </table:table-cell>
          <table:table-cell>
            <text:p>171851</text:p>
          </table:table-cell>
          <table:table-cell>
            <text:p>19/03/1974</text:p>
          </table:table-cell>
          <table:table-cell>
            <text:p>Oui</text:p>
          </table:table-cell>
          <table:table-cell>
            <text:p>Super-Vétéran</text:p>
          </table:table-cell>
          <table:table-cell>
            <text:p/>
          </table:table-cell>
          <table:table-cell>
            <text:p>16/05/2026 BAUDRIERES ST MARCEL Route - 14/05/2026 LE BREUIL CREUSOT VS Route - 10/05/2026 FORLEANS Championnat Régional Route FSGT BFC - 01/05/2026 VERDUN SUR LE DOUBS Route - 26/04/2026 LES BIZOTS CREUSOT VS - 28/02/2026 ECUELLES VERDUN Route - 17/08/2025 Larochemillay LUZY Route - 10/05/2025 VAISON MONTCEAU Route.</text:p>
          </table:table-cell>
        </table:table-row>
        <table:table-row>
          <table:table-cell>
            <text:p>LOUIS Fabrice</text:p>
          </table:table-cell>
          <table:table-cell>
            <text:p>14/01/2026</text:p>
          </table:table-cell>
          <table:table-cell>
            <text:p>172050</text:p>
          </table:table-cell>
          <table:table-cell>
            <text:p>12/10/1971</text:p>
          </table:table-cell>
          <table:table-cell>
            <text:p>Non</text:p>
          </table:table-cell>
          <table:table-cell>
            <text:p>Super-Vétéra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0/05/2026 FORLEANS Championnat Régional Route FSGT BFC - 01/05/2026 VERDUN SUR LE DOUBS Route - 11/04/2026 CHATENOY EN BRESSE ST MARCEL Route - 14/03/2026 JULLY LES BUXY Route - 07/06/2025 Toutenant ST MARTIN Route - 01/06/2025 ST Elisabeth MONTCEAU Route.</text:p>
          </table:table-cell>
        </table:table-row>
        <table:table-row>
          <table:table-cell>
            <text:p>PRECHEUR Nicolas</text:p>
          </table:table-cell>
          <table:table-cell>
            <text:p>15/12/2025</text:p>
          </table:table-cell>
          <table:table-cell>
            <text:p>172557</text:p>
          </table:table-cell>
          <table:table-cell>
            <text:p>18/11/1975</text:p>
          </table:table-cell>
          <table:table-cell>
            <text:p>Oui</text:p>
          </table:table-cell>
          <table:table-cell>
            <text:p>Super-Vétéra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01/05/2026 VERDUN SUR LE DOUBS Route - 19/04/2026 ST EUSEBE ECUISSES Route - 11/04/2026 CHATENOY EN BRESSE ST MARCEL Route - 05/04/2026 ST MARTIN EN BRESSE Route - 28/03/2026 VARENNES ST SAUVEUR Route.</text:p>
          </table:table-cell>
        </table:table-row>
        <table:table-row>
          <table:table-cell>
            <text:p>RYNIKIEWICZ CHRISTOPHE</text:p>
          </table:table-cell>
          <table:table-cell>
            <text:p>02/01/2026</text:p>
          </table:table-cell>
          <table:table-cell>
            <text:p>172064</text:p>
          </table:table-cell>
          <table:table-cell>
            <text:p>07/09/1975</text:p>
          </table:table-cell>
          <table:table-cell>
            <text:p>Non</text:p>
          </table:table-cell>
          <table:table-cell>
            <text:p>Super-Vétéra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03/05/2026 GRANGES Route - 11/04/2026 CHATENOY EN BRESSE ST MARCEL Route - 05/04/2026 ST MARTIN EN BRESSE Route - 14/03/2026 JULLY LES BUXY Route - 07/03/2026 VERZE FLACE Route.</text:p>
          </table:table-cell>
        </table:table-row>
        <table:table-row>
          <table:table-cell>
            <text:p>VILLEROT LAURENT</text:p>
          </table:table-cell>
          <table:table-cell>
            <text:p>22/12/2025</text:p>
          </table:table-cell>
          <table:table-cell>
            <text:p>171752</text:p>
          </table:table-cell>
          <table:table-cell>
            <text:p>16/11/1970</text:p>
          </table:table-cell>
          <table:table-cell>
            <text:p>Non</text:p>
          </table:table-cell>
          <table:table-cell>
            <text:p>Super-Vétéra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0/05/2026 FORLEANS Championnat Régional Route FSGT BFC - 08/05/2026 GENELARD ASPTT CHALON Route - 03/05/2026 GRANGES Route - 01/05/2026 VERDUN SUR LE DOUBS Route - 26/04/2026 LES BIZOTS CREUSOT VS - 11/04/2026 CHATENOY EN BRESSE ST MARCEL Route.</text:p>
          </table:table-cell>
        </table:table-row>
      </table:table>
      <table:table table:name="Anc_H">
        <table:table-row>
          <table:table-cell>
            <text:p>Noms - Prénoms *</text:p>
          </table:table-cell>
          <table:table-cell>
            <text:p>Date de délivrance *</text:p>
          </table:table-cell>
          <table:table-cell>
            <text:p>N° licence FSGT 2026 *</text:p>
          </table:table-cell>
          <table:table-cell>
            <text:p>Date de naissance *</text:p>
          </table:table-cell>
          <table:table-cell>
            <text:p>multi licencié oui / non *</text:p>
          </table:table-cell>
          <table:table-cell>
            <text:p>catégorie</text:p>
          </table:table-cell>
          <table:table-cell>
            <text:p>titre route 2026*</text:p>
          </table:table-cell>
          <table:table-cell>
            <text:p>Participations</text:p>
          </table:table-cell>
        </table:table-row>
        <table:table-row>
          <table:table-cell>
            <text:p>BÉRARD Jean Philippe</text:p>
          </table:table-cell>
          <table:table-cell>
            <text:p>12/12/2025</text:p>
          </table:table-cell>
          <table:table-cell>
            <text:p>281966</text:p>
          </table:table-cell>
          <table:table-cell>
            <text:p>31/01/1966</text:p>
          </table:table-cell>
          <table:table-cell>
            <text:p>Oui</text:p>
          </table:table-cell>
          <table:table-cell>
            <text:p>Ancie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10/05/2026 FORLEANS Championnat Régional Route FSGT BFC - 08/05/2026 GENELARD ASPTT CHALON Route - 19/04/2026 ST EUSEBE ECUISSES Route - 05/04/2026 ST MARTIN EN BRESSE Route - 28/02/2026 ECUELLES VERDUN Route.</text:p>
          </table:table-cell>
        </table:table-row>
        <table:table-row>
          <table:table-cell>
            <text:p>BRIEL Eric</text:p>
          </table:table-cell>
          <table:table-cell>
            <text:p>16/12/2025</text:p>
          </table:table-cell>
          <table:table-cell>
            <text:p>421989</text:p>
          </table:table-cell>
          <table:table-cell>
            <text:p>10/06/1964</text:p>
          </table:table-cell>
          <table:table-cell>
            <text:p>Non</text:p>
          </table:table-cell>
          <table:table-cell>
            <text:p>Ancie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10/05/2026 FORLEANS Championnat Régional Route FSGT BFC - 03/05/2026 GRANGES Route - 26/04/2026 LES BIZOTS CREUSOT VS - 19/04/2026 ST EUSEBE ECUISSES Route - 05/04/2026 ST MARTIN EN BRESSE Route.</text:p>
          </table:table-cell>
        </table:table-row>
        <table:table-row>
          <table:table-cell>
            <text:p>BRUILLOT Dominique</text:p>
          </table:table-cell>
          <table:table-cell>
            <text:p>07/01/2026</text:p>
          </table:table-cell>
          <table:table-cell>
            <text:p>172618</text:p>
          </table:table-cell>
          <table:table-cell>
            <text:p>30/06/1960</text:p>
          </table:table-cell>
          <table:table-cell>
            <text:p>Oui</text:p>
          </table:table-cell>
          <table:table-cell>
            <text:p>Ancien</text:p>
          </table:table-cell>
          <table:table-cell>
            <text:p/>
          </table:table-cell>
          <table:table-cell>
            <text:p>24/05/2026 SENNECEY LE GRAND Championnat Départemental Route FSGT 71 - 10/05/2026 FORLEANS Championnat Régional Route FSGT BFC - 26/04/2026 LES BIZOTS CREUSOT VS - 19/04/2026 ST EUSEBE ECUISSES Route - 05/04/2026 ST MARTIN EN BRESSE Route - 28/03/2026 VARENNES ST SAUVEUR Route - 07/03/2026 VERZE FLACE Route - 28/02/2026 ECUELLES VERDUN Route.</text:p>
          </table:table-cell>
        </table:table-row>
        <table:table-row>
          <table:table-cell>
            <text:p>CHALMANDRIER Christian</text:p>
          </table:table-cell>
          <table:table-cell>
            <text:p>15/12/2025</text:p>
          </table:table-cell>
          <table:table-cell>
            <text:p>171283</text:p>
          </table:table-cell>
          <table:table-cell>
            <text:p>03/03/1959</text:p>
          </table:table-cell>
          <table:table-cell>
            <text:p>Non</text:p>
          </table:table-cell>
          <table:table-cell>
            <text:p>Ancie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08/05/2026 GENELARD ASPTT CHALON Route - 19/04/2026 ST EUSEBE ECUISSES Route - 05/04/2026 ST MARTIN EN BRESSE Route - 21/03/2026 ST MARTIN EN GATINOIS VS CHALON Route - 07/03/2026 VERZE FLACE Route - 10/08/2025 VAISON MONTCEAU Route.</text:p>
          </table:table-cell>
        </table:table-row>
        <table:table-row>
          <table:table-cell>
            <text:p>DEGLUAIRE Jean-Michel</text:p>
          </table:table-cell>
          <table:table-cell>
            <text:p>14/01/2026</text:p>
          </table:table-cell>
          <table:table-cell>
            <text:p>528396</text:p>
          </table:table-cell>
          <table:table-cell>
            <text:p>04/10/1965</text:p>
          </table:table-cell>
          <table:table-cell>
            <text:p>Non</text:p>
          </table:table-cell>
          <table:table-cell>
            <text:p>Ancie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0/05/2026 FORLEANS Championnat Régional Route FSGT BFC - 08/05/2026 GENELARD ASPTT CHALON Route - 26/04/2026 LES BIZOTS CREUSOT VS - 19/04/2026 ST EUSEBE ECUISSES Route - 11/04/2026 CHATENOY EN BRESSE ST MARCEL Route - 05/04/2026 ST MARTIN EN BRESSE Route.</text:p>
          </table:table-cell>
        </table:table-row>
        <table:table-row>
          <table:table-cell>
            <text:p>FOURNIER PASCAL</text:p>
          </table:table-cell>
          <table:table-cell>
            <text:p>19/01/2026</text:p>
          </table:table-cell>
          <table:table-cell>
            <text:p>586581</text:p>
          </table:table-cell>
          <table:table-cell>
            <text:p>25/06/1964</text:p>
          </table:table-cell>
          <table:table-cell>
            <text:p>Non</text:p>
          </table:table-cell>
          <table:table-cell>
            <text:p>Ancie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08/05/2026 GENELARD ASPTT CHALON Route - 26/04/2026 LES BIZOTS CREUSOT VS - 19/04/2026 ST EUSEBE ECUISSES Route - 11/04/2026 CHATENOY EN BRESSE ST MARCEL Route - 05/04/2026 ST MARTIN EN BRESSE Route - 28/03/2026 VARENNES ST SAUVEUR Route.</text:p>
          </table:table-cell>
        </table:table-row>
        <table:table-row>
          <table:table-cell>
            <text:p>GALLET claude</text:p>
          </table:table-cell>
          <table:table-cell>
            <text:p>17/12/2025</text:p>
          </table:table-cell>
          <table:table-cell>
            <text:p>171414</text:p>
          </table:table-cell>
          <table:table-cell>
            <text:p>28/12/1959</text:p>
          </table:table-cell>
          <table:table-cell>
            <text:p>Non</text:p>
          </table:table-cell>
          <table:table-cell>
            <text:p>Ancie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0/05/2026 FORLEANS Championnat Régional Route FSGT BFC - 03/05/2026 GRANGES Route - 11/04/2026 CHATENOY EN BRESSE ST MARCEL Route - 05/04/2026 ST MARTIN EN BRESSE Route - 07/03/2026 VERZE FLACE Route - 28/02/2026 ECUELLES VERDUN Route.</text:p>
          </table:table-cell>
        </table:table-row>
        <table:table-row>
          <table:table-cell>
            <text:p>MORIEUX Bruno</text:p>
          </table:table-cell>
          <table:table-cell>
            <text:p>31/12/2025</text:p>
          </table:table-cell>
          <table:table-cell>
            <text:p>171555</text:p>
          </table:table-cell>
          <table:table-cell>
            <text:p>07/06/1965</text:p>
          </table:table-cell>
          <table:table-cell>
            <text:p>Oui</text:p>
          </table:table-cell>
          <table:table-cell>
            <text:p>Ancie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0/05/2026 FORLEANS Championnat Régional Route FSGT BFC - 19/04/2026 ST EUSEBE ECUISSES Route - 11/04/2026 CHATENOY EN BRESSE ST MARCEL Route - 05/04/2026 ST MARTIN EN BRESSE Route - 07/03/2026 VERZE FLACE Route - 28/02/2026 ECUELLES VERDUN Route.</text:p>
          </table:table-cell>
        </table:table-row>
        <table:table-row>
          <table:table-cell>
            <text:p>MURTIN François</text:p>
          </table:table-cell>
          <table:table-cell>
            <text:p>05/01/2026</text:p>
          </table:table-cell>
          <table:table-cell>
            <text:p>172154</text:p>
          </table:table-cell>
          <table:table-cell>
            <text:p>08/07/1960</text:p>
          </table:table-cell>
          <table:table-cell>
            <text:p>Oui</text:p>
          </table:table-cell>
          <table:table-cell>
            <text:p>Ancien</text:p>
          </table:table-cell>
          <table:table-cell>
            <text:p/>
          </table:table-cell>
          <table:table-cell>
            <text:p>24/05/2026 SENNECEY LE GRAND Championnat Départemental Route FSGT 71 - 01/05/2026 VERDUN SUR LE DOUBS Route - 19/04/2026 ST EUSEBE ECUISSES Route - 11/04/2026 CHATENOY EN BRESSE ST MARCEL Route - 05/04/2026 ST MARTIN EN BRESSE Route - 08/03/2026 VIVANS MARCIGNY Route - 07/03/2026 VERZE FLACE Route - 28/02/2026 ECUELLES VERDUN Route.</text:p>
          </table:table-cell>
        </table:table-row>
      </table:table>
      <table:table table:name="Sup_Anc_H">
        <table:table-row>
          <table:table-cell>
            <text:p>Noms - Prénoms *</text:p>
          </table:table-cell>
          <table:table-cell>
            <text:p>Date de délivrance *</text:p>
          </table:table-cell>
          <table:table-cell>
            <text:p>N° licence FSGT 2026 *</text:p>
          </table:table-cell>
          <table:table-cell>
            <text:p>Date de naissance *</text:p>
          </table:table-cell>
          <table:table-cell>
            <text:p>multi licencié oui / non *</text:p>
          </table:table-cell>
          <table:table-cell>
            <text:p>catégorie</text:p>
          </table:table-cell>
          <table:table-cell>
            <text:p>titre route 2026*</text:p>
          </table:table-cell>
          <table:table-cell>
            <text:p>Participations</text:p>
          </table:table-cell>
        </table:table-row>
        <table:table-row>
          <table:table-cell>
            <text:p>DI CENTA Yvan</text:p>
          </table:table-cell>
          <table:table-cell>
            <text:p>12/01/2026</text:p>
          </table:table-cell>
          <table:table-cell>
            <text:p>172651</text:p>
          </table:table-cell>
          <table:table-cell>
            <text:p>15/08/1954</text:p>
          </table:table-cell>
          <table:table-cell>
            <text:p>Non</text:p>
          </table:table-cell>
          <table:table-cell>
            <text:p>Super-Ancien</text:p>
          </table:table-cell>
          <table:table-cell>
            <text:p/>
          </table:table-cell>
          <table:table-cell>
            <text:p>24/05/2026 SENNECEY LE GRAND Championnat Départemental Route FSGT 71 - 11/04/2026 CHATENOY EN BRESSE ST MARCEL Route - 05/04/2026 ST MARTIN EN BRESSE Route - 28/03/2026 VARENNES ST SAUVEUR Route - 28/02/2026 ECUELLES VERDUN Route - 28/09/2025 VARENNES ST SAUVEUR Clm - 14/09/2025 OUROUX ST MARCEL Clm - 07/09/2025 ST MARTIN EN BRESSE Clm.</text:p>
          </table:table-cell>
        </table:table-row>
        <table:table-row>
          <table:table-cell>
            <text:p>MICHAUDET Jean</text:p>
          </table:table-cell>
          <table:table-cell>
            <text:p>16/12/2025</text:p>
          </table:table-cell>
          <table:table-cell>
            <text:p>171444</text:p>
          </table:table-cell>
          <table:table-cell>
            <text:p>05/03/1954</text:p>
          </table:table-cell>
          <table:table-cell>
            <text:p>Non</text:p>
          </table:table-cell>
          <table:table-cell>
            <text:p>Super-Ancie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14/05/2026 LE BREUIL CREUSOT VS Route - 10/05/2026 FORLEANS Championnat Régional Route FSGT BFC - 08/05/2026 GENELARD ASPTT CHALON Route - 03/05/2026 GRANGES Route - 26/04/2026 LES BIZOTS CREUSOT VS - 11/04/2026 CHATENOY EN BRESSE ST MARCEL Route.</text:p>
          </table:table-cell>
        </table:table-row>
        <table:table-row>
          <table:table-cell>
            <text:p>PANNEQUIN Robert</text:p>
          </table:table-cell>
          <table:table-cell>
            <text:p>30/12/2025</text:p>
          </table:table-cell>
          <table:table-cell>
            <text:p>135900</text:p>
          </table:table-cell>
          <table:table-cell>
            <text:p>20/07/1956</text:p>
          </table:table-cell>
          <table:table-cell>
            <text:p>Oui</text:p>
          </table:table-cell>
          <table:table-cell>
            <text:p>Super-Ancien</text:p>
          </table:table-cell>
          <table:table-cell>
            <text:p/>
          </table:table-cell>
          <table:table-cell>
            <text:p>24/05/2026 SENNECEY LE GRAND Championnat Départemental Route FSGT 71 - 19/04/2026 ST EUSEBE ECUISSES Route - 11/04/2026 CHATENOY EN BRESSE ST MARCEL Route - 28/03/2026 VARENNES ST SAUVEUR Route - 21/03/2026 ST MARTIN EN GATINOIS VS CHALON Route - 07/03/2026 VERZE FLACE Route - 28/02/2026 ECUELLES VERDUN Route - 17/08/2025 Larochemillay LUZY Route.</text:p>
          </table:table-cell>
        </table:table-row>
        <table:table-row>
          <table:table-cell>
            <text:p>ROUSSOT Michel</text:p>
          </table:table-cell>
          <table:table-cell>
            <text:p>16/12/2025</text:p>
          </table:table-cell>
          <table:table-cell>
            <text:p>171441</text:p>
          </table:table-cell>
          <table:table-cell>
            <text:p>19/03/1945</text:p>
          </table:table-cell>
          <table:table-cell>
            <text:p>Non</text:p>
          </table:table-cell>
          <table:table-cell>
            <text:p>Super-Ancien</text:p>
          </table:table-cell>
          <table:table-cell>
            <text:p/>
          </table:table-cell>
          <table:table-cell>
            <text:p>24/05/2026 SENNECEY LE GRAND Championnat Départemental Route FSGT 71 - 16/05/2026 BAUDRIERES ST MARCEL Route - 01/05/2026 VERDUN SUR LE DOUBS Route - 11/04/2026 CHATENOY EN BRESSE ST MARCEL Route - 28/03/2026 VARENNES ST SAUVEUR Route - 21/03/2026 ST MARTIN EN GATINOIS VS CHALON Route - 21/02/2026 SENNECEY LE GRAND ST MARCEL Brevet - 22/06/2025 Louhans Route.</text:p>
          </table:table-cell>
        </table:table-row>
        <table:table-row>
          <table:table-cell>
            <text:p>VALLEZ Francis</text:p>
          </table:table-cell>
          <table:table-cell>
            <text:p>28/12/2025</text:p>
          </table:table-cell>
          <table:table-cell>
            <text:p>154362</text:p>
          </table:table-cell>
          <table:table-cell>
            <text:p>09/01/1954</text:p>
          </table:table-cell>
          <table:table-cell>
            <text:p>Non</text:p>
          </table:table-cell>
          <table:table-cell>
            <text:p>Super-Ancien</text:p>
          </table:table-cell>
          <table:table-cell>
            <text:p/>
          </table:table-cell>
          <table:table-cell>
            <text:p>24/05/2026 SENNECEY LE GRAND Championnat Départemental Route FSGT 71 - 14/05/2026 LE BREUIL CREUSOT VS Route - 10/05/2026 FORLEANS Championnat Régional Route FSGT BFC - 08/05/2026 GENELARD ASPTT CHALON Route - 26/04/2026 LES BIZOTS CREUSOT VS - 19/04/2026 ST EUSEBE ECUISSES Route - 05/04/2026 ST MARTIN EN BRESSE Route - 28/03/2026 VARENNES ST SAUVEUR Rout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